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Linux_Libertine_G_3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nux_Libertine_G_1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  <manifest:file-entry manifest:full-path="Fonts/Font_Linux_Libertine_G_2.ttf" manifest:media-type="application/x-font-ttf"/>
  <manifest:file-entry manifest:full-path="Fonts/Font_OpenSymbol_1.ttf" manifest:media-type="application/x-font-ttf"/>
  <manifest:file-entry manifest:full-path="Fonts/Font_Linux_Libertine_G_4.ttf" manifest:media-type="application/x-font-ttf"/>
  <manifest:file-entry manifest:full-path="content.xml" manifest:media-type="text/xml"/>
  <manifest:file-entry manifest:full-path="Pictures/100000010000015D0000009DBFEF9B4C.png" manifest:media-type="image/png"/>
  <manifest:file-entry manifest:full-path="Pictures/10000000000004AF0000022F7A4C1295.png" manifest:media-type="image/png"/>
  <manifest:file-entry manifest:full-path="Pictures/10000000000003DF000002FB8881A4F3.png" manifest:media-type="image/png"/>
  <manifest:file-entry manifest:full-path="Pictures/10000000000001E50000027AC70D8220.png" manifest:media-type="image/png"/>
  <manifest:file-entry manifest:full-path="Pictures/10000000000001D60000027A31E431F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16.51cm" table:align="margins" style:shadow="none" style:may-break-between-rows="true" table:border-model="collapsing"/>
    </style:style>
    <style:style style:name="Table1.A" style:family="table-column">
      <style:table-column-properties style:column-width="1.588cm" style:rel-column-width="900*"/>
    </style:style>
    <style:style style:name="Table1.B" style:family="table-column">
      <style:table-column-properties style:column-width="1.402cm" style:rel-column-width="795*"/>
    </style:style>
    <style:style style:name="Table1.C" style:family="table-column">
      <style:table-column-properties style:column-width="6.916cm" style:rel-column-width="3921*"/>
    </style:style>
    <style:style style:name="Table1.D" style:family="table-column">
      <style:table-column-properties style:column-width="3.302cm" style:rel-column-width="1872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C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D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E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C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D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E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C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D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E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C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D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E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C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D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E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7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C7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D7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E7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8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C8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D8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E8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9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C9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D9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E9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0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C10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D10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E10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A11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.B11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.C11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.D11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.E11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Heading_20_1" style:master-pag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keep-together="auto" style:page-number="1" fo:background-color="#ffffff" fo:padding="0cm" fo:border="none" fo:keep-with-next="auto"/>
    </style:style>
    <style:style style:name="P2" style:family="paragraph" style:parent-style-name="Heading_20_1">
      <loext:graphic-properties draw:fill="solid" draw:fill-color="#ffffff"/>
      <style:paragraph-properties fo:margin-top="0cm" fo:margin-bottom="0cm" style:contextual-spacing="false" fo:line-height="100%" fo:text-align="center" style:justify-single-word="false" fo:keep-together="auto" fo:background-color="#ffffff" fo:padding="0cm" fo:border="none" fo:keep-with-next="auto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Heading_20_1">
      <loext:graphic-properties draw:fill="solid" draw:fill-color="#ffffff"/>
      <style:paragraph-properties fo:margin-top="0cm" fo:margin-bottom="0cm" style:contextual-spacing="false" fo:line-height="100%" fo:text-align="center" style:justify-single-word="false" fo:keep-together="auto" fo:background-color="#ffffff" fo:padding="0cm" fo:border="none" fo:keep-with-next="auto"/>
      <style:text-properties fo:font-size="12pt" style:font-size-asian="12pt" style:font-size-complex="12pt"/>
    </style:style>
    <style:style style:name="P4" style:family="paragraph" style:parent-style-name="Heading_20_1">
      <loext:graphic-properties draw:fill="solid" draw:fill-color="#ffffff"/>
      <style:paragraph-properties fo:margin-top="0cm" fo:margin-bottom="0.282cm" style:contextual-spacing="false" fo:line-height="100%" fo:text-align="center" style:justify-single-word="false" fo:keep-together="auto" fo:background-color="#ffffff" fo:padding="0cm" fo:border="none" fo:keep-with-next="auto"/>
      <style:text-properties fo:font-size="12pt" fo:font-weight="bold" officeooo:rsid="001ef4ac" officeooo:paragraph-rsid="001ef4ac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Heading_20_1">
      <loext:graphic-properties draw:fill="solid" draw:fill-color="#ffffff"/>
      <style:paragraph-properties fo:margin-top="0cm" fo:margin-bottom="0cm" style:contextual-spacing="false" fo:line-height="100%" fo:text-align="start" style:justify-single-word="false" fo:keep-together="auto" fo:background-color="#ffffff" fo:padding="0cm" fo:border="none" fo:keep-with-next="auto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Heading_20_1">
      <loext:graphic-properties draw:fill="solid" draw:fill-color="#ffffff"/>
      <style:paragraph-properties fo:margin-top="0cm" fo:margin-bottom="0.282cm" style:contextual-spacing="false" fo:line-height="100%" fo:text-align="center" style:justify-single-word="false" fo:keep-together="auto" fo:background-color="#ffffff" fo:padding="0cm" fo:border="none" fo:keep-with-next="auto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Heading_20_1">
      <style:paragraph-properties fo:margin-top="0.847cm" fo:margin-bottom="0.212cm" style:contextual-spacing="false" fo:line-height="100%" fo:keep-together="auto" fo:keep-with-next="auto"/>
      <style:text-properties fo:font-size="24pt" fo:font-weight="bold" style:font-size-asian="24pt" style:font-weight-asian="bold" style:font-size-complex="24pt" style:font-weight-complex="bold"/>
    </style:style>
    <style:style style:name="P9" style:family="paragraph" style:parent-style-name="Heading_20_1">
      <style:paragraph-properties fo:break-before="page"/>
      <style:text-properties officeooo:rsid="001f1b7e" officeooo:paragraph-rsid="001f1b7e"/>
    </style:style>
    <style:style style:name="P10" style:family="paragraph" style:parent-style-name="Text_20_body">
      <style:text-properties officeooo:rsid="001f1b7e" officeooo:paragraph-rsid="001f1b7e"/>
    </style:style>
    <style:style style:name="P11" style:family="paragraph" style:parent-style-name="Standard">
      <style:text-properties officeooo:rsid="001f1b7e" officeooo:paragraph-rsid="001f1b7e"/>
    </style:style>
    <style:style style:name="P12" style:family="paragraph" style:parent-style-name="Heading_20_1">
      <style:text-properties officeooo:rsid="001f1b7e" officeooo:paragraph-rsid="001f1b7e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f48d7" officeooo:paragraph-rsid="001f48d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f48d7" officeooo:paragraph-rsid="001f48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Heading_20_1">
      <style:text-properties officeooo:paragraph-rsid="001f1b7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officeooo:rsid="001deee8"/>
    </style:style>
    <style:style style:name="T3" style:family="text">
      <style:text-properties officeooo:rsid="00209b20"/>
    </style:style>
    <style:style style:name="T4" style:family="text">
      <style:text-properties officeooo:rsid="001f48d7"/>
    </style:style>
    <style:style style:name="T5" style:family="text">
      <style:text-properties officeooo:rsid="001f1b7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iflyfzof9xwx"/><draw:frame draw:style-name="fr1" draw:name="image2.png" text:anchor-type="as-char" svg:width="6.174cm" svg:height="2.787cm" draw:z-index="0"><draw:image xlink:href="Pictures/100000010000015D0000009DBFEF9B4C.png" xlink:type="simple" xlink:show="embed" xlink:actuate="onLoad" draw:mime-type="image/png"/></draw:frame><text:span text:style-name="T1"><text:s/></text:span></text:p>
      <text:p text:style-name="P2"><text:bookmark text:name="_iflyfzof9xwx1"/><text:s/></text:p>
      <text:p text:style-name="P2"><text:bookmark text:name="_iflyfzof9xwx2"/><text:s/></text:p>
      <text:p text:style-name="P2"><text:bookmark text:name="_iflyfzof9xwx3"/>INSTITUTO TECNOLÓGICO JOSÉ MARIO MOLINA PASQUEL Y HENRÍQUEZ UNIDAD ACADÉMICA LAGOS DE MORENO. <text:s/></text:p>
      <text:p text:style-name="P2"><text:bookmark text:name="_iflyfzof9xwx4"/><text:s/></text:p>
      <text:p text:style-name="P3"><text:bookmark text:name="_iflyfzof9xwx5"/>Nombre de<text:span text:style-name="T2">l Proyecto</text:span>: </text:p>
      <text:p text:style-name="P4">FNK: Finders not Keepers</text:p>
      <text:p text:style-name="P2"><text:bookmark text:name="_iflyfzof9xwx7"/><text:s/></text:p>
      <text:p text:style-name="P3"><text:bookmark text:name="_iflyfzof9xwx8"/><text:s/>Nombre del <text:span text:style-name="T2">Equipo</text:span>: </text:p>
      <text:p text:style-name="P5">GUILLERMO ROMERO CUEVAS</text:p>
      <text:p text:style-name="P2"><text:bookmark text:name="_iflyfzof9xwx9"/><text:s/></text:p>
      <text:p text:style-name="P6"><text:bookmark text:name="_iflyfzof9xwx10"/></text:p>
      <text:p text:style-name="P2"><text:bookmark text:name="_iflyfzof9xwx11"/><text:s/></text:p>
      <text:p text:style-name="P3"><text:bookmark text:name="_iflyfzof9xwx12"/><text:s/>Carrera </text:p>
      <text:p text:style-name="P2"><text:bookmark text:name="_iflyfzof9xwx13"/><text:s/>SISTEMAS COMPUTACIONALES </text:p>
      <text:p text:style-name="Standard"/>
      <text:p text:style-name="P3"><text:bookmark text:name="_iflyfzof9xwx14"/><text:s/>Docente </text:p>
      <text:p text:style-name="P2"><text:bookmark text:name="_iflyfzof9xwx15"/>MTRO. Pedro Espinoza Ezparzar </text:p>
      <text:p text:style-name="Standard"/>
      <text:p text:style-name="P3"><text:bookmark text:name="_iflyfzof9xwx16"/><text:s/>Materia </text:p>
      <text:p text:style-name="P7"><text:bookmark text:name="_iflyfzof9xwx17"/><text:s/>DevOps</text:p>
      <text:p text:style-name="P2"><text:bookmark text:name="_iflyfzof9xwx18"/><text:s/></text:p>
      <text:p text:style-name="P2"><text:bookmark text:name="_iflyfzof9xwx19"/><text:s/></text:p>
      <text:p text:style-name="Standard"/>
      <text:p text:style-name="Standard"/>
      <text:p text:style-name="Standard"/>
      <text:p text:style-name="Standard"/>
      <text:p text:style-name="P3"><text:bookmark text:name="_girbydoqs9ao"/><text:s/>Instituto Tecnológico José Mario Molina Pasquel y Henríquez Unidad Académica Lagos de Moreno Libramiento Tecnológico #5000 Colonia Portugalejo de los Romanes Tel. y Fax. (52) 01-474-72-52-100 y 101 Lagos de Moreno, Jalisco; México.Crear la extensión MEDINA. </text:p>
      <text:p text:style-name="P8"><text:bookmark text:name="_ut89lrtvnby2"/></text:p>
      <text:p text:style-name="P9">Problematica</text:p>
      <text:p text:style-name="P10">El Programa esta diseñado para <text:s/>ayudar a las personas de una organizacion reportar objetos perdidos y encontrados, asi como facilitar su busqueda y administracion, reduciendo </text:p>
      <text:p text:style-name="Heading_20_1"><text:line-break/>El Equipo</text:p>
      <text:p text:style-name="P11">El equipo se conforma de un solo integrante;</text:p>
      <text:p text:style-name="P11">- Guillermo Romero Cuevas: Lead Dev y Scrum Master</text:p>
      <text:p text:style-name="P12">Requerimientos</text:p>
      <table:table table:name="Table1" table:style-name="Table1" table:template-name="Elegant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 table:style-name="Table1.1">
          <table:table-cell table:style-name="Table1.A1" office:value-type="string">
            <text:p text:style-name="P13">ID</text:p>
          </table:table-cell>
          <table:table-cell table:style-name="Table1.A1" office:value-type="string">
            <text:p text:style-name="P13">Epica</text:p>
          </table:table-cell>
          <table:table-cell table:style-name="Table1.A1" office:value-type="string">
            <text:p text:style-name="P13">Historia de usuario/<text:span text:style-name="T3">Requerimiento</text:span></text:p>
          </table:table-cell>
          <table:table-cell table:style-name="Table1.A1" office:value-type="string">
            <text:p text:style-name="P13">Prioridad</text:p>
          </table:table-cell>
          <table:table-cell table:style-name="Table1.A1" office:value-type="string">
            <text:p text:style-name="P13">Criterios de Aceptación</text:p>
          </table:table-cell>
        </table:table-row>
        <table:table-row>
          <table:table-cell table:style-name="Table1.A2" office:value-type="string">
            <text:p text:style-name="P14">RF-01</text:p>
          </table:table-cell>
          <table:table-cell table:style-name="Table1.B2" office:value-type="string">
            <text:p text:style-name="P14">EP-01</text:p>
          </table:table-cell>
          <table:table-cell table:style-name="Table1.C2" office:value-type="string">
            <text:p text:style-name="P15">Como Encontrador, Quiero Ver y Editar mis registros, para Corregir Equivocaciones</text:p>
          </table:table-cell>
          <table:table-cell table:style-name="Table1.D2" office:value-type="string">
            <text:p text:style-name="P14">Alta</text:p>
          </table:table-cell>
          <table:table-cell table:style-name="Table1.E2" office:value-type="string">
            <text:p text:style-name="P15">Puedo ver un</text:p>
            <text:p text:style-name="P15">registro</text:p>
            <text:p text:style-name="P15">previo,</text:p>
            <text:p text:style-name="P15">Modificar</text:p>
            <text:p text:style-name="P15">Información, y</text:p>
            <text:p text:style-name="P15">guardar la</text:p>
            <text:p text:style-name="P15">nueva</text:p>
            <text:p text:style-name="P15">información</text:p>
          </table:table-cell>
        </table:table-row>
        <table:table-row>
          <table:table-cell table:style-name="Table1.A2" office:value-type="string">
            <text:p text:style-name="P14">RF-02</text:p>
          </table:table-cell>
          <table:table-cell table:style-name="Table1.B3" office:value-type="string">
            <text:p text:style-name="P14">EP-01</text:p>
          </table:table-cell>
          <table:table-cell table:style-name="Table1.C3" office:value-type="string">
            <text:p text:style-name="P15">Como Encontrador, Quiero Ver registros de</text:p>
            <text:p text:style-name="P15">búsqueda, para poder buscar y compara los</text:p>
            <text:p text:style-name="P15">objetos que encuentro con los objetos</text:p>
            <text:p text:style-name="P15">perdido</text:p>
          </table:table-cell>
          <table:table-cell table:style-name="Table1.D3" office:value-type="string">
            <text:p text:style-name="P14">Alta</text:p>
          </table:table-cell>
          <table:table-cell table:style-name="Table1.E3" office:value-type="string">
            <text:p text:style-name="P15">Puedo ver un</text:p>
            <text:p text:style-name="P15">registro previo</text:p>
            <text:p text:style-name="P15">y Buscar con</text:p>
            <text:p text:style-name="P15">un filtro o</text:p>
            <text:p text:style-name="P15">busqueda</text:p>
          </table:table-cell>
        </table:table-row>
        <table:table-row>
          <table:table-cell table:style-name="Table1.A2" office:value-type="string">
            <text:p text:style-name="P14">RF-03</text:p>
          </table:table-cell>
          <table:table-cell table:style-name="Table1.B4" office:value-type="string">
            <text:p text:style-name="P14">EP-01</text:p>
          </table:table-cell>
          <table:table-cell table:style-name="Table1.C4" office:value-type="string">
            <text:p text:style-name="P15">Como Buscador, Quiero Ver y Editar Mis</text:p>
            <text:p text:style-name="P15">registros, para Corregir Equivocaciones</text:p>
          </table:table-cell>
          <table:table-cell table:style-name="Table1.D4" office:value-type="string">
            <text:p text:style-name="P14">Alta</text:p>
          </table:table-cell>
          <table:table-cell table:style-name="Table1.E4" office:value-type="string">
            <text:p text:style-name="P15">Puedo ver un</text:p>
            <text:p text:style-name="P15">registro</text:p>
            <text:p text:style-name="P15">previo,</text:p>
            <text:p text:style-name="P15">Modificar</text:p>
            <text:p text:style-name="P15">Información, y</text:p>
            <text:p text:style-name="P15">guardar la</text:p>
            <text:p text:style-name="P15">nueva</text:p>
            <text:p text:style-name="P15">informacion</text:p>
          </table:table-cell>
        </table:table-row>
        <table:table-row>
          <table:table-cell table:style-name="Table1.A2" office:value-type="string">
            <text:p text:style-name="P14">RF-04</text:p>
          </table:table-cell>
          <table:table-cell table:style-name="Table1.B5" office:value-type="string">
            <text:p text:style-name="P14">EP-01</text:p>
          </table:table-cell>
          <table:table-cell table:style-name="Table1.C5" office:value-type="string">
            <text:p text:style-name="P15">Como Administrador, Quiero Ver, y Eliminar</text:p>
            <text:p text:style-name="P15"><text:soft-page-break/>registros, para Moderar el contenido que</text:p>
            <text:p text:style-name="P15">buscan los otros usuarios</text:p>
          </table:table-cell>
          <table:table-cell table:style-name="Table1.D5" office:value-type="string">
            <text:p text:style-name="P14">Media</text:p>
          </table:table-cell>
          <table:table-cell table:style-name="Table1.E5" office:value-type="string">
            <text:p text:style-name="P15">Puedo ver un</text:p>
            <text:p text:style-name="P15">registro previo</text:p>
            <text:p text:style-name="P15"><text:soft-page-break/>y eliminarlo.</text:p>
          </table:table-cell>
        </table:table-row>
        <table:table-row>
          <table:table-cell table:style-name="Table1.A2" office:value-type="string">
            <text:p text:style-name="P14">RF-05</text:p>
          </table:table-cell>
          <table:table-cell table:style-name="Table1.B6" office:value-type="string">
            <text:p text:style-name="P14">EP-02</text:p>
          </table:table-cell>
          <table:table-cell table:style-name="Table1.C6" office:value-type="string">
            <text:p text:style-name="P15">Como Encontrador, Quiero registrar objetos</text:p>
            <text:p text:style-name="P15">encontrados, para que otros usuarios puedan</text:p>
            <text:p text:style-name="P15">reclamarlo</text:p>
          </table:table-cell>
          <table:table-cell table:style-name="Table1.D6" office:value-type="string">
            <text:p text:style-name="P14">Alta</text:p>
          </table:table-cell>
          <table:table-cell table:style-name="Table1.E6" office:value-type="string">
            <text:p text:style-name="P15">Puedo Hacer</text:p>
            <text:p text:style-name="P15">un Nuevo</text:p>
            <text:p text:style-name="P15">registro de</text:p>
            <text:p text:style-name="P15">objeto</text:p>
            <text:p text:style-name="P15">encontrado</text:p>
          </table:table-cell>
        </table:table-row>
        <table:table-row>
          <table:table-cell table:style-name="Table1.A2" office:value-type="string">
            <text:p text:style-name="P14">RF-06</text:p>
          </table:table-cell>
          <table:table-cell table:style-name="Table1.B7" office:value-type="string">
            <text:p text:style-name="P14">EP-02</text:p>
          </table:table-cell>
          <table:table-cell table:style-name="Table1.C7" office:value-type="string">
            <text:p text:style-name="P15">Como Buscador quiero registrar Objetos que</text:p>
            <text:p text:style-name="P15">estoy Buscando, para que si un Encontrador</text:p>
            <text:p text:style-name="P15">lo encuentre, lo pueda entregar</text:p>
          </table:table-cell>
          <table:table-cell table:style-name="Table1.D7" office:value-type="string">
            <text:p text:style-name="P14">Alta</text:p>
          </table:table-cell>
          <table:table-cell table:style-name="Table1.E7" office:value-type="string">
            <text:p text:style-name="P15">Puedo Hacer</text:p>
            <text:p text:style-name="P15">un Nuevo</text:p>
            <text:p text:style-name="P15">registro de</text:p>
            <text:p text:style-name="P15">objeto que</text:p>
            <text:p text:style-name="P15">estoy</text:p>
            <text:p text:style-name="P15">buscando</text:p>
          </table:table-cell>
        </table:table-row>
        <table:table-row>
          <table:table-cell table:style-name="Table1.A2" office:value-type="string">
            <text:p text:style-name="P14">RF-07</text:p>
          </table:table-cell>
          <table:table-cell table:style-name="Table1.B8" office:value-type="string">
            <text:p text:style-name="P14">EP-02</text:p>
          </table:table-cell>
          <table:table-cell table:style-name="Table1.C8" office:value-type="string">
            <text:p text:style-name="P15"><text:span text:style-name="T4">C</text:span>omo Buscador, quiero Poder Eliminar Mi</text:p>
            <text:p text:style-name="P15">registro, para indicar que ya no lo busco</text:p>
          </table:table-cell>
          <table:table-cell table:style-name="Table1.D8" office:value-type="string">
            <text:p text:style-name="P14">Media</text:p>
          </table:table-cell>
          <table:table-cell table:style-name="Table1.E8" office:value-type="string">
            <text:p text:style-name="P15">Puedo</text:p>
            <text:p text:style-name="P15">eliminar uno</text:p>
            <text:p text:style-name="P15">de Mis</text:p>
            <text:p text:style-name="P15">Propios</text:p>
            <text:p text:style-name="P15">Registros</text:p>
            <text:p text:style-name="P15">Previos, o</text:p>
            <text:p text:style-name="P15">Marcarlo</text:p>
            <text:p text:style-name="P15">como Ignorar</text:p>
            <text:p text:style-name="P15">para que no</text:p>
            <text:p text:style-name="P15">aparezca</text:p>
          </table:table-cell>
        </table:table-row>
        <table:table-row>
          <table:table-cell table:style-name="Table1.A2" office:value-type="string">
            <text:p text:style-name="P14">RF-08</text:p>
          </table:table-cell>
          <table:table-cell table:style-name="Table1.B9" office:value-type="string">
            <text:p text:style-name="P14">EP-03</text:p>
          </table:table-cell>
          <table:table-cell table:style-name="Table1.C9" office:value-type="string">
            <text:p text:style-name="P15">Como Buscador quiero poder reclamar un</text:p>
            <text:p text:style-name="P15">objeto encontrado, para que el Encontrador</text:p>
            <text:p text:style-name="P15">lo pueda entregar</text:p>
          </table:table-cell>
          <table:table-cell table:style-name="Table1.D9" office:value-type="string">
            <text:p text:style-name="P14">Alta</text:p>
          </table:table-cell>
          <table:table-cell table:style-name="Table1.E9" office:value-type="string">
            <text:p text:style-name="P15">Puedo marcar</text:p>
            <text:p text:style-name="P15">un Registro</text:p>
            <text:p text:style-name="P15">de Objeto</text:p>
            <text:p text:style-name="P15">encontrado</text:p>
            <text:p text:style-name="P15">como Propio,</text:p>
            <text:p text:style-name="P15">para poder</text:p>
            <text:p text:style-name="P15">empezar el</text:p>
            <text:p text:style-name="P15">proceso de</text:p>
            <text:p text:style-name="P15">reclamo</text:p>
          </table:table-cell>
        </table:table-row>
        <table:table-row>
          <table:table-cell table:style-name="Table1.A2" office:value-type="string">
            <text:p text:style-name="P14">RF-09</text:p>
          </table:table-cell>
          <table:table-cell table:style-name="Table1.B10" office:value-type="string">
            <text:p text:style-name="P14">EP-03</text:p>
          </table:table-cell>
          <table:table-cell table:style-name="Table1.C10" office:value-type="string">
            <text:p text:style-name="P15">Como Encontrador, quiero poder marcar un</text:p>
            <text:p text:style-name="P15">Objeto Encontrado como Encontrado, Para</text:p>
            <text:p text:style-name="P15">poder entregarselo al Buscador</text:p>
          </table:table-cell>
          <table:table-cell table:style-name="Table1.D10" office:value-type="string">
            <text:p text:style-name="P14">Baja</text:p>
          </table:table-cell>
          <table:table-cell table:style-name="Table1.E10" office:value-type="string">
            <text:p text:style-name="P15">Puedo marcar</text:p>
            <text:p text:style-name="P15">el objeto que</text:p>
            <text:p text:style-name="P15">alguien esta</text:p>
            <text:p text:style-name="P15">buscando</text:p>
            <text:p text:style-name="P15">como</text:p>
            <text:p text:style-name="P15">encontrado</text:p>
          </table:table-cell>
        </table:table-row>
        <table:table-row table:style-name="Table1.1">
          <table:table-cell table:style-name="Table1.A11" office:value-type="string">
            <text:p text:style-name="P14">RF-10</text:p>
          </table:table-cell>
          <table:table-cell table:style-name="Table1.B11" office:value-type="string">
            <text:p text:style-name="P14">EP-03</text:p>
          </table:table-cell>
          <table:table-cell table:style-name="Table1.C11" office:value-type="string">
            <text:p text:style-name="P15">Como Buscador, quiero contactar al</text:p>
            <text:p text:style-name="P15">Encontrador que encontro mi objeto, <text:soft-page-break/>para</text:p>
            <text:p text:style-name="P15">poder recibir el Objeto</text:p>
          </table:table-cell>
          <table:table-cell table:style-name="Table1.D11" office:value-type="string">
            <text:p text:style-name="P14">Media</text:p>
          </table:table-cell>
          <table:table-cell table:style-name="Table1.E11" office:value-type="string">
            <text:p text:style-name="P15">Puedo</text:p>
            <text:p text:style-name="P15">Comunicarme</text:p>
            <text:p text:style-name="P15"><text:soft-page-break/>con la</text:p>
            <text:p text:style-name="P15">persona que</text:p>
            <text:p text:style-name="P15">Encontro o</text:p>
            <text:p text:style-name="P15">busca el</text:p>
            <text:p text:style-name="P15">Objeto</text:p>
            <text:p text:style-name="P15">Respectivo</text:p>
          </table:table-cell>
        </table:table-row>
      </table:table>
      <text:p text:style-name="P11"/>
      <text:p text:style-name="P16"><text:span text:style-name="T5">Diagramas</text:span></text:p>
      <text:p text:style-name="P17"><draw:frame draw:style-name="fr2" draw:name="Image1" text:anchor-type="as-char" svg:width="16.51cm" svg:height="7.696cm" draw:z-index="1"><draw:image xlink:href="Pictures/10000000000004AF0000022F7A4C1295.png" xlink:type="simple" xlink:show="embed" xlink:actuate="onLoad" draw:mime-type="image/png"/></draw:frame></text:p>
      <text:p text:style-name="P17"><text:soft-page-break/><draw:frame draw:style-name="fr2" draw:name="Image2" text:anchor-type="as-char" svg:width="16.51cm" svg:height="12.711cm" draw:z-index="2"><draw:image xlink:href="Pictures/10000000000003DF000002FB8881A4F3.png" xlink:type="simple" xlink:show="embed" xlink:actuate="onLoad" draw:mime-type="image/png"/></draw:frame></text:p>
      <text:list text:style-name="L1">
        <text:list-item>
          <text:p text:style-name="P18">Diagramas de Secuencia (mínimo 2)</text:p>
        </text:list-item>
      </text:list>
      <text:p text:style-name="Standard"><text:soft-page-break/><draw:frame draw:style-name="fr2" draw:name="Image3" text:anchor-type="as-char" svg:width="12.435cm" svg:height="16.775cm" draw:z-index="3"><draw:image xlink:href="Pictures/10000000000001E50000027AC70D8220.png" xlink:type="simple" xlink:show="embed" xlink:actuate="onLoad" draw:mime-type="image/png"/></draw:frame><text:soft-page-break/><draw:frame draw:style-name="fr2" draw:name="Image4" text:anchor-type="as-char" svg:width="12.435cm" svg:height="16.775cm" draw:z-index="4"><draw:image xlink:href="Pictures/10000000000001D60000027A31E431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MX">
      <number:number number:min-integer-digits="1"/>
    </number:number-style>
    <number:text-style style:name="N20100" number:language="es" number:country="MX">
      <number:text-content/>
    </number:text-style>
    <style:style style:name="Elegant.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2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dc:date>2026-05-05T20:47:53.168270000</dc:date>
    <meta:editing-duration>PT1H2M40S</meta:editing-duration>
    <meta:editing-cycles>3</meta:editing-cycles>
    <meta:document-statistic meta:table-count="1" meta:image-count="5" meta:object-count="0" meta:page-count="7" meta:paragraph-count="162" meta:word-count="429" meta:character-count="2747" meta:non-whitespace-character-count="2443"/>
  </office:meta>
</office:document-meta>
</file>